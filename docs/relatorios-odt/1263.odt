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Ciclo de estudos 2017/2 do Ifes campus Serr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Gilmar Luiz Vassoler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31/07/2017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1/08/2017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82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Ciclo de Estudos 2017/2 do Ifes campus Serra proporcionou a participação de 82 estudantes e 15 membros da equipe, promovendo discussões e reflexões sobre temas relevantes para a formação acadêmica e profissional. A ação contribuiu para o fortalecimento do diálogo entre discentes e servidores, ampliando o acesso ao conhecimento e à troca de experiências no âmbito institucional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