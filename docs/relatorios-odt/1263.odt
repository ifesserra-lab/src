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iclo de estudos 2017/2 do Ifes campus Ser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lmar Luiz Vassoler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31/07/2017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1/08/201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82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