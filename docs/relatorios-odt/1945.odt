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Intenção Profissional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Wallas Gusmão Thoma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1/08/2018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9/11/2018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52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Intenção Profissional</text:p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projeto Intenção Profissional alcançou 52 estudantes do 2º Ano do Ensino Médio, oferecendo orientação e reflexão sobre as possibilidades e desafios da construção de uma carreira. A iniciativa impactou positivamente na conscientização dos participantes acerca da importância da escolha profissional, contribuindo para a formação integral dos alunos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