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Diálogos que Transformam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Giordana dos Santos Sperandio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1) Direitos Humanos e Justiça                  (   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