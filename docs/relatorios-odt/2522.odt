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I Seminário do Núcleo de Estudos Afro-Brasileiros e Indígenas do Ifes Campus Serra – Levantamento das referências culturais de São José do Queimado, Serra/ES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Diego Ramiro Araoz Alves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>04/07/2019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>05/07/2019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>(   ) Comunicação(1) Cultura</text:p>
          </table:table-cell>
          <table:table-cell table:style-name="Tabela22.B2" office:value-type="string">
            <text:p text:style-name="P42"><text:span text:style-name="T7">( <text:s text:c="2"/>) </text:span>Direitos Humanos e Justiça <text:s text:c="17"/></text:p>
            <text:p text:style-name="P42"><text:span text:style-name="T7">( <text:s text:c="2"/>)</text:span>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0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>I Seminário do Núcleo de Estudos Afro-Brasileiros e Indígenas do Ifes Campus Serra – Levantamento das referências culturais de São José do Queimado, Serra/ES</text:p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>[Sugestão gerada por IA (Mistral) — revise e ajuste antes de enviar]
O I Seminário do Núcleo de Estudos Afro-Brasileiros e Indígenas do Ifes Campus Serra apresentou resultados parciais de pesquisa sobre referências culturais de São José do Queimado, reunindo estudantes, movimentos sociais e representantes institucionais. A ação fomentou o debate sobre diversidade cultural e memória local, fortalecendo a identidade e o pertencimento da comunidade.</text:p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