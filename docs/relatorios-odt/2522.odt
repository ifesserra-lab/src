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I Seminário do Núcleo de Estudos Afro-Brasileiros e Indígenas do Ifes Campus Serra – Levantamento das referências culturais de São José do Queimado, Serra/ES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Diego Ramiro Araoz Alv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4/07/2019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5/07/2019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