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"(Con)versando sobre – Temas transversais"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Cibelle Zanforlin Cesconetto Toresani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