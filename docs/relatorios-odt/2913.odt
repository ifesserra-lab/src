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rojeto "Física e Química na Prática"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Rosiane Ribeiro Roch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0/02/2020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9/02/2021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