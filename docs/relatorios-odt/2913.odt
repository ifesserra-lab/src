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rojeto "Física e Química na Prática"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Rosiane Ribeiro Roch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10/02/2020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9/02/2021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Projeto "Física e Química na Prática"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jeto Física e Química na Prática, desenvolvido por 4 servidores, buscou aproximar conceitos teóricos e práticos das ciências exatas para a comunidade acadêmica. A iniciativa contribuiu para a promoção do ensino experimental e da interdisciplinaridade, ainda que não tenha sido possível mensurar o público diretamente impactado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