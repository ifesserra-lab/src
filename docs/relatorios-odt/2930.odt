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2º Seminário do Núcleo de Estudos Afro-Brasileiros e Indígenas do IFES Campus Serra – “Educação e Patrimônio: O Caso de São José do Queimado”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Leonardo Matiazzi Corrê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