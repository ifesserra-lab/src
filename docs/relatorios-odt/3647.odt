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O povo preto realmente é livre?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Lívia de Azevedo Silveira Rangel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1) Direitos Humanos e Justiça                  (   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