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studos e Práticas para Simulação de Organizações Internacionais e Direitos Humano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Nicole Silva Los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5/08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