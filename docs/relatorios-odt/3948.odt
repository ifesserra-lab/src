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EAM – Programa de Estudos Avançados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2/12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39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PEAM – Programa de Estudos Avançados em Matemática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grama proporcionou aos estudantes dos cursos técnicos integrados ao Ensino Médio a aprofundamento em tópicos matemáticos não contemplados integralmente no currículo escolar, favorecendo a melhoria do desempenho acadêmico e a ampliação de conhecimentos específicos da áre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