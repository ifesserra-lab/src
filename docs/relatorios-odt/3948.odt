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EAM – Programa de Estudos Avançados em Matemát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Paulo Cezar Camargo Gued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8/08/2022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2/12/2022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39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