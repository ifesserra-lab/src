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ficina de Tutoria em Fís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Cezar Camargo Gued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8/08/2022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2/12/2022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Oficina de Tutoria em Física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A oficina de tutoria em Física ofereceu suporte aos alunos com dificuldades no aprendizado da disciplina, por meio de atividades de resolução de exercícios e acompanhamento personalizado. A iniciativa buscou mitigar os impactos da pandemia e de outros fatores educacionais no desempenho dos estudante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