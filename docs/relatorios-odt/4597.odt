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 IFES é o meu lugar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3/04/2023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3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79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O IFES é o meu lugar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contribuiu para a integração dos estudantes ingressantes ao campus, promovendo a ambientação e o fortalecimento do pertencimento institucional. As ações desenvolvidas favoreceram a adaptação dos novos alunos ao ambiente acadêmico e às dinâmicas do IFES Serr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