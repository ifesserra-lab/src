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“Conversando sobre”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Erica Giles Braganç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9/08/2023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9/08/2023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2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evento possibilitou a reflexão dos estudantes sobre assistência social e direitos, por meio de dinâmicas interativas e palestra especializada. A iniciativa reforçou a importância do acesso a informações sobre direitos sociais e assistência estudantil no âmbito institucional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