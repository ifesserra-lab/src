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Projeto Avançar – Nivelamento em Matemática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Augusto Cesar Machado Ramos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18/03/2024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29/11/2024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>Projeto Avançar – Nivelamento em Matemática</text:p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>[Sugestão gerada por IA (Mistral) — revise e ajuste antes de enviar]
O projeto possibilitou a redução de lacunas de aprendizagem em Matemática entre os estudantes ingressantes nos Cursos Técnicos Integrados ao Ensino Médio, contribuindo para a melhoria do desempenho acadêmico e a permanência no curso. A sistematização da intervenção pedagógica favoreceu a construção de bases sólidas para o desenvolvimento de competências essenciais na disciplina.</text:p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