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onectando Talentos: Robótica e Programação no IFES-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ichard Junior Manuel Godinez Tell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7/11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0/04/2026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168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promoveu a capacitação de estudantes do ensino fundamental e médio em programação e robótica, ampliando o acesso a tecnologias e fomentando habilidades técnicas e criativas. As ações desenvolvidas fortaleceram a formação cidadã e o interesse dos participantes por áreas STEM, impactando positivamente a trajetória educacional e profissional dos envolvido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