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onectando Talentos: Robótica e Programação no IFES-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Richard Junior Manuel Godinez Tell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7/11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0/04/2026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168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