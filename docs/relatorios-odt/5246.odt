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Semana da Consciência Negra – IFES-Serra - 2024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Amarildo Mendes Lemos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>22/11/2024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>22/11/2024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1) Direitos Humanos e Justiça                  (   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>Semana da Consciência Negra – IFES-Serra - 2024</text:p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>[Sugestão gerada por IA (Mistral) — revise e ajuste antes de enviar]
O evento contribuiu para a reflexão sobre a igualdade racial e a valorização da cultura afro-brasileira e indígena, sensibilizando a comunidade acadêmica para as demandas históricas e sociais relacionadas à justiça e reparação. A iniciativa reforçou o compromisso institucional com a promoção de direitos humanos e a diversidade no ambiente educacional.</text:p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