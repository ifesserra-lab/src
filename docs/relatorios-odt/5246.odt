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Semana da Consciência Negra – IFES-Serra - 2024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Amarildo Mendes Lemos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22/11/2024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22/11/2024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1) Direitos Humanos e Justiça                  (   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