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Inclusão e Tecnologia: Robótica para Pessoas com Autismo no IFES Serra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Marco Antônio de Souza Leite Cuadros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