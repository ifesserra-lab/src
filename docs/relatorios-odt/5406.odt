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Jogos Estaduais do IFES 2025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Milainy Ludmila Santos Goulart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10/03/2025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18/07/2025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   ) Comunicação(1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48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