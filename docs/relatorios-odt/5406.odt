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Jogos Estaduais do IFES 2025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Milainy Ludmila Santos Goulart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10/03/2025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18/07/2025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48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Jogos Estaduais do IFES 2025</text:p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As oficinas esportivas proporcionaram formação técnica e tática aos estudantes, preparando-os para as competições dos Jogos Estaduais do IFES 2025. A ação fomentou a cultura esportiva e o lazer, além de estimular valores como trabalho em equipe, disciplina e superação, impactando positivamente a vivência estudantil no campus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