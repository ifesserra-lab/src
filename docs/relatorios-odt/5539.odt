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onexão Ciência: Transformação Digital das Atividades do Centro de Ciência Educação e Cultura - Praça da Ciênci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Vitor Faiçal Campan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