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alestra -Lançamento de documentário: A beleza oculta no poder feminin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drianna Machado Meneguelli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