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ultura Impressa: Esculturas 3D de artesãos locais com filamento de material reciclad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abriel Tozatto Zag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