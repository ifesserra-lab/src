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Mulheres Mil - Eletricista Instalador Predial em Baixa Tensão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Tatiane Policário Chaga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>(1) Tecnologia e Produção(   ) Trabalho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