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cm" fo:margin-right="0.286cm" fo:margin-top="0.049cm" fo:margin-bottom="0.049cm" loext:contextual-spacing="false" fo:line-height="100%" fo:text-align="start" style:justify-single-word="false" fo:text-indent="0cm" style:auto-text-indent="false" text:number-lines="false" text:line-number="0">
        <style:tab-stops>
          <style:tab-stop style:position="0cm"/>
        </style:tab-stops>
      </style:paragraph-properties>
      <style:text-properties fo:color="#000000" style:font-name="Arial" fo:font-size="10pt" fo:font-weight="normal" ns42:rsid="0034e133" ns42:paragraph-rsid="0078c66e" style:font-size-asian="10pt" style:font-weight-asian="normal" style:font-size-complex="10pt" style:font-weight-complex="normal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I COLÓQUIO DE PRODUÇÃO E CRIATIVIDADE – CAMPUS SERRA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Adrianna Machado Meneguelli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 text:style-name="P103"><text:tab/> <text:s text:c="5"/>/ <text:s text:c="9"/>/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 text:style-name="P103"><text:tab/> <text:s text:c="5"/>/ <text:s text:c="9"/>/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>(   ) Comunicação(1) Cultura</text:p>
          </table:table-cell>
          <table:table-cell table:style-name="Tabela22.B2" office:value-type="string">
            <text:p text:style-name="P42"><text:span text:style-name="T7">( <text:s text:c="2"/>) </text:span>Direitos Humanos e Justiça <text:s text:c="17"/></text:p>
            <text:p text:style-name="P42"><text:span text:style-name="T7">( <text:s text:c="2"/>)</text:span>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