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Oficinas e Tutorias de Apoio às Disciplinas Curriculares na Perspectiva Inclusiva – NAPNE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Nauvia Maria Cancelieri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>09/06/2026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>30/12/2027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>(   ) Direitos Humanos e Justiça                  (1)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