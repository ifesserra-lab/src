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Formação Profissional em Realidade Virtual para Jovens e Realizadores de Audiovisual na 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Celio Proliciano Maiol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