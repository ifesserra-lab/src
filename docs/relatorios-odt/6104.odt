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APEXT 2026 – Atendimentos Personalizados e Monitorias de Extensão Tecnológ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Jefferson Ribeiro de Lima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