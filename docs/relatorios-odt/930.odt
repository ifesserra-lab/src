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Despertar da Força - Processos e Ferramentas para o Gerenciamento Ágil de Projetos: Uma Abordagem Prática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Paulo Sérgio dos Santos Júnior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>01/10/2016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>01/12/2016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>(   ) Direitos Humanos e Justiça                  (1)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53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