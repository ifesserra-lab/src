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Energia Solar Fotovolta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Giovani Zanetti Neto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4/03/2017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25/03/2017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>(1) Tecnologia e Produção(   ) Trabalho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25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