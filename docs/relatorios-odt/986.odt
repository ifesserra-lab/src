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Energia Solar Fotovolta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Giovani Zanetti Neto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4/03/2017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5/03/2017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>(1) Tecnologia e Produção(   ) Trabalho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25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Energia Solar Fotovoltaica</text:p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curso capacitou 25 participantes em fundamentos teóricos e práticos sobre energia solar fotovoltaica, disseminando conhecimentos essenciais para a adoção de tecnologias sustentáveis. A formação contribuiu para a ampliação da conscientização sobre fontes renováveis de energia e para a aplicação de sistemas solares em contextos locais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